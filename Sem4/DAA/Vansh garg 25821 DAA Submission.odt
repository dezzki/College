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90000030482DC2507.png" manifest:media-type="image/png"/>
  <manifest:file-entry manifest:full-path="Pictures/10000000000000D5000000AAA6967A93.png" manifest:media-type="image/png"/>
  <manifest:file-entry manifest:full-path="Pictures/10000000000001E5000002B48FC98CA9.png" manifest:media-type="image/png"/>
  <manifest:file-entry manifest:full-path="Pictures/10000000000002200000038AA8394F28.png" manifest:media-type="image/png"/>
  <manifest:file-entry manifest:full-path="Pictures/100000010000044000000C205ECEBA2E.png" manifest:media-type="image/png"/>
  <manifest:file-entry manifest:full-path="Pictures/1000000000000135000000A561250082.png" manifest:media-type="image/png"/>
  <manifest:file-entry manifest:full-path="Pictures/10000000000000E2000000740A6158A5.png" manifest:media-type="image/png"/>
  <manifest:file-entry manifest:full-path="Pictures/10000000000000CE00000075B3827CBE.png" manifest:media-type="image/png"/>
  <manifest:file-entry manifest:full-path="Pictures/100000000000010D000000B6F7821651.png" manifest:media-type="image/png"/>
  <manifest:file-entry manifest:full-path="Pictures/100000010000044000000A58337772D1.png" manifest:media-type="image/png"/>
  <manifest:file-entry manifest:full-path="Pictures/100000010000053A00000A32F86CCC3E.png" manifest:media-type="image/png"/>
  <manifest:file-entry manifest:full-path="Pictures/10000000000000F2000000B41DC6A504.png" manifest:media-type="image/png"/>
  <manifest:file-entry manifest:full-path="Pictures/10000000000000ED0000009ACC1B41EC.png" manifest:media-type="image/png"/>
  <manifest:file-entry manifest:full-path="Pictures/100000010000049400000A32E63BC27B.png" manifest:media-type="image/png"/>
  <manifest:file-entry manifest:full-path="Pictures/100000000000026F000002F1EBDAF820.png" manifest:media-type="image/png"/>
  <manifest:file-entry manifest:full-path="Pictures/1000000000000118000000B1B5D879DF.png" manifest:media-type="image/png"/>
  <manifest:file-entry manifest:full-path="Pictures/10000000000000D30000007BEC3C5D07.png" manifest:media-type="image/png"/>
  <manifest:file-entry manifest:full-path="Pictures/100000010000044000000A58716F4C5C.png" manifest:media-type="image/png"/>
  <manifest:file-entry manifest:full-path="Pictures/10000000000000EC000000B0A642626B.png" manifest:media-type="image/png"/>
  <manifest:file-entry manifest:full-path="Pictures/10000000000001E70000032F85079B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4096d" officeooo:paragraph-rsid="0014096d" style:font-size-asian="20pt" style:font-size-complex="20pt"/>
    </style:style>
    <style:style style:name="P2" style:family="paragraph" style:parent-style-name="Standard">
      <style:text-properties officeooo:rsid="0014096d" officeooo:paragraph-rsid="0014096d"/>
    </style:style>
    <style:style style:name="P3" style:family="paragraph" style:parent-style-name="Standard">
      <style:text-properties officeooo:rsid="0015754f" officeooo:paragraph-rsid="0015754f"/>
    </style:style>
    <style:style style:name="P4" style:family="paragraph" style:parent-style-name="Standard">
      <style:text-properties officeooo:rsid="0015d8e7" officeooo:paragraph-rsid="0015d8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A Practicals</text:p>
      <text:p text:style-name="P2"/>
      <text:p text:style-name="P2">Vansh Garg</text:p>
      <text:p text:style-name="P2">Bsc (Hons) Computer Science</text:p>
      <text:p text:style-name="P2">25821</text:p>
      <text:p text:style-name="P2"/>
      <text:p text:style-name="P2"/>
      <text:p text:style-name="P3">Q1) Write a program to sort the elements of an array using Insertion Sort (The program</text:p>
      <text:p text:style-name="P3">should report the number of comparisons).</text:p>
      <text:p text:style-name="P3"/>
      <text:p text:style-name="P3"/>
      <text:p text:style-name="P3"><draw:frame draw:style-name="fr1" draw:name="Image1" text:anchor-type="char" svg:x="-0.2043in" svg:y="0.111in" svg:width="4.002in" svg:height="6.6661in" draw:z-index="0"><draw:image xlink:href="Pictures/10000000000002200000038AA8394F2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4.198in" svg:y="0.0835in" svg:width="3.2189in" svg:height="1.7189in" draw:z-index="1"><draw:image xlink:href="Pictures/1000000000000135000000A56125008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2) Write a program to sort the elements of an array using Merge Sort (The program</text:p>
      <text:p text:style-name="P3">should report the number of comparisons).</text:p>
      <text:p text:style-name="P3"><text:s/></text:p>
      <text:p text:style-name="P3"/>
      <text:p text:style-name="P3"/>
      <text:p text:style-name="P3"><draw:frame draw:style-name="fr1" draw:name="Image3" text:anchor-type="char" svg:x="0.048in" svg:y="0.172in" svg:width="3.311in" svg:height="8.0575in" draw:z-index="2"><draw:image xlink:href="Pictures/100000010000044000000A58337772D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char" svg:x="4.3291in" svg:y="0.0575in" svg:width="2.4689in" svg:height="1.6043in" draw:z-index="3"><draw:image xlink:href="Pictures/10000000000000ED0000009ACC1B41E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3) Write a program to sort the elements of an array using Heap Sort (The program</text:p>
      <text:p text:style-name="P3">should report the number of comparisons).</text:p>
      <text:p text:style-name="P3"/>
      <text:p text:style-name="P3"/>
      <text:p text:style-name="P3"/>
      <text:p text:style-name="P3"><draw:frame draw:style-name="fr1" draw:name="Image5" text:anchor-type="char" svg:x="0.1165in" svg:y="0.0417in" svg:width="3.1008in" svg:height="8.8472in" draw:z-index="4"><draw:image xlink:href="Pictures/100000010000044000000C205ECEBA2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char" svg:x="4.1102in" svg:y="0.1354in" svg:width="2.802in" svg:height="1.8957in" draw:z-index="5"><draw:image xlink:href="Pictures/100000000000010D000000B6F78216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4) <text:s/>Write a program to sort the elements of an array using Quick Sort (The program</text:p>
      <text:p text:style-name="P3">should report the number of comparisons).</text:p>
      <text:p text:style-name="P3"/>
      <text:p text:style-name="P3"><draw:frame draw:style-name="fr1" draw:name="Image7" text:anchor-type="char" svg:x="-0.1575in" svg:y="0.0965in" svg:width="4.011in" svg:height="8.9335in" draw:z-index="6"><draw:image xlink:href="Pictures/100000010000049400000A32E63BC27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x="4.5075in" svg:y="0.1626in" svg:width="2.4583in" svg:height="1.8335in" draw:z-index="7"><draw:image xlink:href="Pictures/10000000000000EC000000B0A642626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Q5) <text:s/>Write a program to multiply two matrices using the Strassen’s algorithm for matrix</text:p>
      <text:p text:style-name="P4">multiplication.</text:p>
      <text:p text:style-name="P4"/>
      <text:p text:style-name="P4"/>
      <text:p text:style-name="P4"><draw:frame draw:style-name="fr1" draw:name="Image9" text:anchor-type="char" svg:x="-0.2953in" svg:y="0.1764in" svg:width="4.3484in" svg:height="7.1465in" draw:z-index="8"><draw:image xlink:href="Pictures/100000000000026F000002F1EBDAF82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char" svg:x="4.4693in" svg:y="0.0984in" svg:width="2.9165in" svg:height="1.8437in" draw:z-index="9"><draw:image xlink:href="Pictures/1000000000000118000000B1B5D879D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Q6) Write a program to sort the elements of an array using Count Sort..</text:p>
      <text:p text:style-name="P4"/>
      <text:p text:style-name="P4"/>
      <text:p text:style-name="P4"><draw:frame draw:style-name="fr1" draw:name="Image11" text:anchor-type="char" svg:x="-0.1535in" svg:y="0.039in" svg:width="3.378in" svg:height="8.2217in" draw:z-index="10"><draw:image xlink:href="Pictures/100000010000044000000A58716F4C5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2" text:anchor-type="char" svg:x="4.1638in" svg:y="0.1217in" svg:width="2.5209in" svg:height="1.8752in" draw:z-index="11"><draw:image xlink:href="Pictures/10000000000000F2000000B41DC6A50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7) Display the data stored in a given graph using the Breadth-First Search algorithm.</text:p>
      <text:p text:style-name="P4"/>
      <text:p text:style-name="P4"/>
      <text:p text:style-name="P4"/>
      <text:p text:style-name="P4"><draw:frame draw:style-name="fr1" draw:name="Image13" text:anchor-type="char" svg:x="-0.289in" svg:y="0.0189in" svg:width="4.4638in" svg:height="8.4898in" draw:z-index="12"><draw:image xlink:href="Pictures/10000000000001E70000032F85079BA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4" text:anchor-type="char" svg:x="4.8028in" svg:y="0.1075in" svg:width="2.1457in" svg:height="1.2189in" draw:z-index="13"><draw:image xlink:href="Pictures/10000000000000CE00000075B3827CB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8) Display the data stored in a given graph using the Depth-First Search algorithm.</text:p>
      <text:p text:style-name="P4"/>
      <text:p text:style-name="P4"/>
      <text:p text:style-name="P4"><draw:frame draw:style-name="fr1" draw:name="Image15" text:anchor-type="char" svg:x="-0.2264in" svg:y="0.1209in" svg:width="4.6098in" svg:height="7.2083in" draw:z-index="14"><draw:image xlink:href="Pictures/10000000000001E5000002B48FC98CA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6" text:anchor-type="char" svg:x="4.8465in" svg:y="0.1457in" svg:width="2.198in" svg:height="1.2811in" draw:z-index="15"><draw:image xlink:href="Pictures/10000000000000D30000007BEC3C5D07.png" xlink:type="simple" xlink:show="embed" xlink:actuate="onLoad" draw:mime-type="image/png"/></draw:frame>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Q9) Write a program to determine a minimum spanning tree of a graph using the Prim’s</text:p>
      <text:p text:style-name="P4">algorithm.</text:p>
      <text:p text:style-name="P4"/>
      <text:p text:style-name="P4"/>
      <text:p text:style-name="P4"><draw:frame draw:style-name="fr1" draw:name="Image17" text:anchor-type="char" svg:x="-0.2425in" svg:y="0.0102in" svg:width="4.0874in" svg:height="7.9736in" draw:z-index="16"><draw:image xlink:href="Pictures/100000010000053A00000A32F86CCC3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8" text:anchor-type="char" svg:x="4.7146in" svg:y="0.0236in" svg:width="2.2189in" svg:height="1.7709in" draw:z-index="17"><draw:image xlink:href="Pictures/10000000000000D5000000AAA6967A9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10) <text:s/>Write a program to solve the 0-1 knapsack problem.</text:p>
      <text:p text:style-name="P4"/>
      <text:p text:style-name="P4"><draw:frame draw:style-name="fr1" draw:name="Image19" text:anchor-type="char" svg:x="-0.1047in" svg:y="0.5382in" svg:width="5.0091in" svg:height="7.2161in" draw:z-index="18"><draw:image xlink:href="Pictures/10000000000002490000030482DC2507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Image20" text:anchor-type="char" svg:x="5.1154in" svg:y="2.3264in" svg:width="2.3543in" svg:height="1.2083in" draw:z-index="19"><draw:image xlink:href="Pictures/10000000000000E2000000740A6158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2T10:08:54.921669513</meta:creation-date>
    <dc:date>2026-05-12T10:46:57.098187247</dc:date>
    <meta:editing-duration>PT2S</meta:editing-duration>
    <meta:editing-cycles>1</meta:editing-cycles>
    <meta:document-statistic meta:table-count="0" meta:image-count="20" meta:object-count="0" meta:page-count="10" meta:paragraph-count="21" meta:word-count="181" meta:character-count="1046" meta:non-whitespace-character-count="881"/>
    <meta:generator>LibreOffice/26.2.2.2$Linux_X86_64 LibreOffice_project/620$Build-2</meta:generator>
  </office:meta>
</office:document-meta>
</file>